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12cm" svg:height="4.064cm" svg:x="5.953cm" svg:y="1.243cm">
          <text:p/>
        </draw:rect>
        <draw:frame draw:style-name="gr2" draw:text-style-name="P2" draw:layer="layout" svg:width="7.112cm" svg:height="3.81cm" svg:x="5.953cm" svg:y="2.27cm">
          <draw:text-box>
            <text:p text:style-name="P2">MATPOWER podaci</text:p>
          </draw:text-box>
        </draw:frame>
        <draw:line draw:style-name="gr3" draw:text-style-name="P1" draw:layer="layout" svg:x1="9.544cm" svg:y1="5.307cm" svg:x2="9.544cm" svg:y2="6.577cm">
          <text:p/>
        </draw:line>
        <draw:rect draw:style-name="gr1" draw:text-style-name="P1" draw:layer="layout" svg:width="7.112cm" svg:height="4.064cm" svg:x="5.98cm" svg:y="6.543cm">
          <text:p/>
        </draw:rect>
        <draw:line draw:style-name="gr3" draw:text-style-name="P1" draw:layer="layout" svg:x1="9.544cm" svg:y1="10.607cm" svg:x2="9.544cm" svg:y2="11.877cm">
          <text:p/>
        </draw:line>
        <draw:frame draw:style-name="gr4" draw:text-style-name="P3" draw:layer="layout" svg:width="6.858cm" svg:height="3.937cm" svg:x="6.08cm" svg:y="7.177cm">
          <draw:text-box>
            <text:p text:style-name="P2">Plugin generiše .dmodl model</text:p>
          </draw:text-box>
        </draw:frame>
        <draw:line draw:style-name="gr3" draw:text-style-name="P1" draw:layer="layout" svg:x1="9.544cm" svg:y1="15.807cm" svg:x2="9.544cm" svg:y2="17.077cm">
          <text:p/>
        </draw:line>
        <draw:rect draw:style-name="gr1" draw:text-style-name="P1" draw:layer="layout" svg:width="7.112cm" svg:height="4.064cm" svg:x="5.953cm" svg:y="11.743cm">
          <text:p/>
        </draw:rect>
        <draw:frame draw:style-name="gr2" draw:text-style-name="P1" draw:layer="layout" svg:width="6.985cm" svg:height="3.81cm" svg:x="6.08cm" svg:y="12.211cm">
          <draw:text-box>
            <text:p text:style-name="P1">U modelu se definišu mjerenja I Gaussov šum</text:p>
          </draw:text-box>
        </draw:frame>
        <draw:rect draw:style-name="gr1" draw:text-style-name="P1" draw:layer="layout" svg:width="7.112cm" svg:height="4.064cm" svg:x="5.98cm" svg:y="17.043cm">
          <text:p/>
        </draw:rect>
        <draw:rect draw:style-name="gr1" draw:text-style-name="P1" draw:layer="layout" svg:width="7.112cm" svg:height="4.064cm" svg:x="5.98cm" svg:y="22.343cm">
          <text:p/>
        </draw:rect>
        <draw:line draw:style-name="gr3" draw:text-style-name="P1" draw:layer="layout" svg:x1="9.544cm" svg:y1="21.107cm" svg:x2="9.544cm" svg:y2="22.377cm">
          <text:p/>
        </draw:line>
        <draw:frame draw:style-name="gr4" draw:text-style-name="P1" draw:layer="layout" svg:width="6.858cm" svg:height="3.937cm" svg:x="6.08cm" svg:y="17.329cm">
          <draw:text-box>
            <text:p text:style-name="P1">Dtwin se izvršava pritiskom na Solve</text:p>
          </draw:text-box>
        </draw:frame>
        <draw:frame draw:style-name="gr2" draw:text-style-name="P1" draw:layer="layout" svg:width="6.985cm" svg:height="3.81cm" svg:x="6.08cm" svg:y="22.663cm">
          <draw:text-box>
            <text:p text:style-name="P1">WLS estimacija napona I uglova EES siste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un Wolf</meta:initial-creator>
    <meta:creation-date>2026-07-05T12:54:29.63</meta:creation-date>
    <dc:date>2026-07-06T12:23:41.52</dc:date>
    <dc:creator>Harun Wolf</dc:creator>
    <meta:editing-duration>PT23H29M11S</meta:editing-duration>
    <meta:editing-cycles>2</meta:editing-cycles>
    <meta:generator>OpenOffice/4.1.16$Win32 OpenOffice.org_project/4116m3$Build-9816</meta:generator>
    <meta:document-statistic meta:object-count="14"/>
  </office:meta>
</office:document-meta>
</file>