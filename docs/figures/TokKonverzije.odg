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standard">
      <style:graphic-properties draw:stroke="none" svg:stroke-color="#000000" draw:fill="none" draw:fill-color="#ffffff" fo:min-height="1.017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svg:stroke-color="#000000" draw:fill="none" draw:fill-color="#ffffff" fo:min-height="1.274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366cm" svg:height="1.651cm" svg:x="9.509cm" svg:y="1.254cm">
          <text:p/>
        </draw:rect>
        <draw:frame draw:style-name="gr2" draw:text-style-name="P2" draw:layer="layout" svg:width="7.366cm" svg:height="1.397cm" svg:x="9.509cm" svg:y="1.381cm">
          <draw:text-box>
            <text:p text:style-name="P2"><text:span text:style-name="T1">MATPOWER 3phase .m fajl</text:span></text:p>
            <text:p text:style-name="P2"><text:span text:style-name="T1">(bus3p,line3p,xmfr3p)</text:span></text:p>
          </draw:text-box>
        </draw:frame>
        <draw:frame draw:style-name="gr3" draw:layer="layout" svg:width="0.127cm" svg:height="1.204cm" svg:x="9.128cm" svg:y="0.619cm">
          <draw:text-box>
            <text:p/>
          </draw:text-box>
        </draw:frame>
        <draw:line draw:style-name="gr4" draw:text-style-name="P1" draw:layer="layout" svg:x1="12.811cm" svg:y1="2.905cm" svg:x2="12.811cm" svg:y2="4.048cm">
          <text:p/>
        </draw:line>
        <draw:rect draw:style-name="gr1" draw:text-style-name="P1" draw:layer="layout" svg:width="7.366cm" svg:height="1.651cm" svg:x="9.509cm" svg:y="4.055cm">
          <text:p/>
        </draw:rect>
        <draw:frame draw:style-name="gr5" draw:text-style-name="P2" draw:layer="layout" svg:width="7.112cm" svg:height="1.775cm" svg:x="9.636cm" svg:y="4.048cm">
          <draw:text-box>
            <text:p text:style-name="P2"><text:span text:style-name="T1">C++ konvertor</text:span></text:p>
            <text:p text:style-name="P2"><text:span text:style-name="T1">(ConvertorCore.cpp)</text:span></text:p>
            <text:p text:style-name="P2"><text:span text:style-name="T1">(parsiranje MATPOWER fajla)</text:span></text:p>
          </draw:text-box>
        </draw:frame>
        <draw:frame draw:style-name="gr6" draw:text-style-name="P3" draw:layer="layout" svg:width="4.826cm" svg:height="0.759cm" svg:x="12.838cm" svg:y="3.086cm">
          <draw:text-box>
            <text:p text:style-name="P3"><text:span text:style-name="T1">Učitavanje podataka</text:span></text:p>
          </draw:text-box>
        </draw:frame>
        <draw:rect draw:style-name="gr1" draw:text-style-name="P1" draw:layer="layout" svg:width="7.366cm" svg:height="2.078cm" svg:x="9.509cm" svg:y="6.796cm">
          <text:p/>
        </draw:rect>
        <draw:line draw:style-name="gr4" draw:text-style-name="P1" draw:layer="layout" svg:x1="12.811cm" svg:y1="5.705cm" svg:x2="12.811cm" svg:y2="6.848cm">
          <text:p/>
        </draw:line>
        <draw:frame draw:style-name="gr2" draw:text-style-name="P2" draw:layer="layout" svg:width="7.239cm" svg:height="1.775cm" svg:x="9.509cm" svg:y="6.969cm">
          <draw:text-box>
            <text:p text:style-name="P2"><text:span text:style-name="T1">Interni model mreže,sabirnice,faze,vodovi,potrošači,transformatori</text:span></text:p>
          </draw:text-box>
        </draw:frame>
        <draw:frame draw:style-name="gr7" draw:text-style-name="P3" draw:layer="layout" svg:width="6.985cm" svg:height="1.267cm" svg:x="12.811cm" svg:y="5.929cm">
          <draw:text-box>
            <text:p text:style-name="P3"><text:span text:style-name="T1">Izdvajanje mrežnih elemenata</text:span></text:p>
          </draw:text-box>
        </draw:frame>
        <draw:line draw:style-name="gr4" draw:text-style-name="P1" draw:layer="layout" svg:x1="12.811cm" svg:y1="8.905cm" svg:x2="12.811cm" svg:y2="10.048cm">
          <text:p/>
        </draw:line>
        <draw:rect draw:style-name="gr1" draw:text-style-name="P1" draw:layer="layout" svg:width="7.366cm" svg:height="1.164cm" svg:x="9.509cm" svg:y="9.996cm">
          <text:p/>
        </draw:rect>
        <draw:frame draw:style-name="gr8" draw:text-style-name="P2" draw:layer="layout" svg:width="7.112cm" svg:height="1.905cm" svg:x="9.636cm" svg:y="10.017cm">
          <draw:text-box>
            <text:p text:style-name="P2"><text:span text:style-name="T1">Formiranje Ybus matrice</text:span></text:p>
          </draw:text-box>
        </draw:frame>
        <draw:rect draw:style-name="gr1" draw:text-style-name="P1" draw:layer="layout" svg:width="7.366cm" svg:height="1.826cm" svg:x="9.509cm" svg:y="12.255cm">
          <text:p/>
        </draw:rect>
        <draw:line draw:style-name="gr4" draw:text-style-name="P1" draw:layer="layout" svg:x1="12.811cm" svg:y1="11.105cm" svg:x2="12.811cm" svg:y2="12.248cm">
          <text:p/>
        </draw:line>
        <draw:frame draw:style-name="gr9" draw:text-style-name="P2" draw:layer="layout" svg:width="7.239cm" svg:height="1.775cm" svg:x="9.636cm" svg:y="12.303cm">
          <draw:text-box>
            <text:p text:style-name="P2"><text:span text:style-name="T1">Formiranje mjernih jednačina</text:span></text:p>
            <text:p text:style-name="P2"><text:span text:style-name="T1">I = Ybus · V</text:span></text:p>
            <text:p text:style-name="P2"><text:span text:style-name="T1">Sᵢ = Vᵢ · conj(ΣYᵢⱼVⱼ)</text:span></text:p>
          </draw:text-box>
        </draw:frame>
        <draw:line draw:style-name="gr4" draw:text-style-name="P1" draw:layer="layout" svg:x1="12.811cm" svg:y1="14.105cm" svg:x2="12.811cm" svg:y2="15.248cm">
          <text:p/>
        </draw:line>
        <draw:rect draw:style-name="gr1" draw:text-style-name="P1" draw:layer="layout" svg:width="7.366cm" svg:height="1.651cm" svg:x="9.509cm" svg:y="15.255cm">
          <text:p/>
        </draw:rect>
        <draw:frame draw:style-name="gr2" draw:text-style-name="P2" draw:layer="layout" svg:width="7.366cm" svg:height="1.397cm" svg:x="9.509cm" svg:y="15.351cm">
          <draw:text-box>
            <text:p text:style-name="P2"><text:span text:style-name="T1">Generisanje dTwin fajlova</text:span></text:p>
            <text:p text:style-name="P2"><text:span text:style-name="T1">.dmodl + .vmodl</text:span></text:p>
          </draw:text-box>
        </draw:frame>
        <draw:line draw:style-name="gr4" draw:text-style-name="P1" draw:layer="layout" svg:x1="12.811cm" svg:y1="16.905cm" svg:x2="12.811cm" svg:y2="18.048cm">
          <text:p/>
        </draw:line>
        <draw:rect draw:style-name="gr1" draw:text-style-name="P1" draw:layer="layout" svg:width="7.366cm" svg:height="1.651cm" svg:x="9.509cm" svg:y="18.056cm">
          <text:p/>
        </draw:rect>
        <draw:frame draw:style-name="gr10" draw:text-style-name="P2" draw:layer="layout" svg:width="7.366cm" svg:height="1.778cm" svg:x="9.509cm" svg:y="18.018cm">
          <draw:text-box>
            <text:p text:style-name="P2"><text:span text:style-name="T1">Dtwin WLS solver</text:span></text:p>
            <text:p text:style-name="P2"><text:span text:style-name="T1">Estimacija stanja sistema</text:span></text:p>
          </draw:text-box>
        </draw:frame>
        <draw:frame draw:style-name="gr11" draw:text-style-name="P2" draw:layer="layout" svg:width="5.842cm" svg:height="1.016cm" svg:x="12.23cm" svg:y="9.001cm">
          <draw:text-box>
            <text:p text:style-name="P2"><text:span text:style-name="T1">Računanje admitansi</text:span></text:p>
          </draw:text-box>
        </draw:frame>
        <draw:frame draw:style-name="gr12" draw:text-style-name="P3" draw:layer="layout" svg:width="6.096cm" svg:height="0.759cm" svg:x="12.965cm" svg:y="14.262cm">
          <draw:text-box>
            <text:p text:style-name="P3"><text:span text:style-name="T1">Klik na Conve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un Wolf</meta:initial-creator>
    <meta:creation-date>2026-07-06T12:24:14.11</meta:creation-date>
    <dc:date>2026-07-06T17:22:51.76</dc:date>
    <dc:creator>Harun Wolf</dc:creator>
    <meta:editing-duration>PT4H27M16S</meta:editing-duration>
    <meta:editing-cycles>3</meta:editing-cycles>
    <meta:generator>OpenOffice/4.1.16$Win32 OpenOffice.org_project/4116m3$Build-9816</meta:generator>
    <meta:document-statistic meta:object-count="25"/>
  </office:meta>
</office:document-meta>
</file>